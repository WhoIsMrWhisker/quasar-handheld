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80000032C34C67AFF.png" manifest:media-type="image/png"/>
  <manifest:file-entry manifest:full-path="Pictures/10000001000004520000033214A56715.png" manifest:media-type="image/png"/>
  <manifest:file-entry manifest:full-path="Pictures/10000001000004220000031AE7874ED7.png" manifest:media-type="image/png"/>
  <manifest:file-entry manifest:full-path="Pictures/1000000100000436000002E9AF2B3142.png" manifest:media-type="image/png"/>
  <manifest:file-entry manifest:full-path="Pictures/1000000100000424000002F2A0C1FE3A.png" manifest:media-type="image/png"/>
  <manifest:file-entry manifest:full-path="Pictures/1000000100000434000002F7CB940F8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Звичайни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draw:style-name="gr1" draw:text-style-name="P1" draw:layer="layout" svg:width="14cm" svg:height="2cm" svg:x="1cm" svg:y="0.5cm">
          <draw:text-box>
            <text:p>Components Layout</text:p>
            <text:p/>
          </draw:text-box>
        </draw:frame>
        <draw:frame draw:style-name="gr2" draw:text-style-name="P2" draw:layer="layout" svg:width="16.83cm" svg:height="12.655cm" svg:x="4.67cm" svg:y="2cm">
          <draw:image xlink:href="Pictures/10000001000004380000032C34C67A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1T0">
        <draw:frame draw:style-name="gr1" draw:text-style-name="P1" draw:layer="layout" svg:width="14cm" svg:height="2cm" svg:x="1cm" svg:y="0.5cm">
          <draw:text-box>
            <text:p>F.Cu</text:p>
          </draw:text-box>
        </draw:frame>
        <draw:frame draw:style-name="gr2" draw:text-style-name="P2" draw:layer="layout" svg:width="17.641cm" svg:height="13.047cm" svg:x="4.359cm" svg:y="1.5cm">
          <draw:image xlink:href="Pictures/10000001000004520000033214A5671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1T0">
        <draw:frame draw:style-name="gr1" draw:text-style-name="P1" draw:layer="layout" svg:width="14cm" svg:height="2cm" svg:x="1cm" svg:y="0.5cm">
          <draw:text-box>
            <text:p>B.Cu</text:p>
          </draw:text-box>
        </draw:frame>
        <draw:frame draw:style-name="gr2" draw:text-style-name="P2" draw:layer="layout" svg:width="17.987cm" svg:height="13.498cm" svg:x="4.013cm" svg:y="1.002cm">
          <draw:image xlink:href="Pictures/10000001000004220000031AE7874ED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1T0">
        <draw:frame draw:style-name="gr1" draw:text-style-name="P1" draw:layer="layout" svg:width="14cm" svg:height="2cm" svg:x="1cm" svg:y="0.5cm">
          <draw:text-box>
            <text:p>In1.Cu</text:p>
          </draw:text-box>
        </draw:frame>
        <draw:frame draw:style-name="gr2" draw:text-style-name="P2" draw:layer="layout" svg:width="18.388cm" svg:height="12.708cm" svg:x="4cm" svg:y="1.792cm">
          <draw:image xlink:href="Pictures/1000000100000436000002E9AF2B3142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1T0">
        <draw:frame draw:style-name="gr1" draw:text-style-name="P1" draw:layer="layout" svg:width="14cm" svg:height="2cm" svg:x="1cm" svg:y="0.5cm">
          <draw:text-box>
            <text:p>In2.Cu</text:p>
          </draw:text-box>
        </draw:frame>
        <draw:frame draw:style-name="gr2" draw:text-style-name="P2" draw:layer="layout" svg:width="18.564cm" svg:height="13.205cm" svg:x="4cm" svg:y="1.5cm">
          <draw:image xlink:href="Pictures/1000000100000424000002F2A0C1FE3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1T0">
        <draw:frame draw:style-name="gr1" draw:text-style-name="P1" draw:layer="layout" svg:width="14cm" svg:height="2cm" svg:x="0.5cm" svg:y="0.5cm">
          <draw:text-box>
            <text:p>Combined</text:p>
          </draw:text-box>
        </draw:frame>
        <draw:frame draw:style-name="gr2" draw:text-style-name="P2" draw:layer="layout" svg:width="18.657cm" svg:height="13.16cm" svg:x="4cm" svg:y="1.34cm">
          <draw:image xlink:href="Pictures/1000000100000434000002F7CB940F80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false" style:shrink-to-fit="true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.4cm" fo:margin-bottom="0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.3cm" fo:margin-bottom="0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.2cm" fo:margin-bottom="0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.1cm" fo:margin-bottom="0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.1cm" fo:margin-bottom="0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.1cm" fo:margin-bottom="0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.1cm" fo:margin-bottom="0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.1cm" fo:margin-bottom="0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Звичайни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Звичайний-title" draw:layer="backgroundobjects" svg:width="25.199cm" svg:height="2.629cm" svg:x="1.4cm" svg:y="0.628cm" presentation:class="title" presentation:placeholder="true">
        <draw:text-box/>
      </draw:frame>
      <draw:frame presentation:style-name="Звичайни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9.798cm" svg:height="11.136cm" svg:x="0.6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7T09:44:55.169126700</meta:creation-date>
    <dc:date>2026-07-17T09:57:37.379307600</dc:date>
    <meta:editing-duration>PT1M38S</meta:editing-duration>
    <meta:editing-cycles>1</meta:editing-cycles>
    <meta:generator>LibreOffice/26.2.4.2$Windows_X86_64 LibreOffice_project/0229ac93fcf0d7cbc6376066c6f35021cef002dc</meta:generator>
    <meta:document-statistic meta:object-count="45"/>
  </office:meta>
</office:document-meta>
</file>